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9c6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pport débuggage du site "Nina Carducci"</text:p>
      <text:p text:style-name="Standard"/>
      <text:p text:style-name="Standard">Le but de la manœuvre est de livrer un site rapide et fiable,</text:p>
      <text:p text:style-name="Standard">accessible pour les personnes en situation de handicap et le plus</text:p>
      <text:p text:style-name="Standard">facilement maintenable à l'avenir.</text:p>
      <text:p text:style-name="Standard"/>
      <text:p text:style-name="Standard">Performances (64% au départ, 98% maintenant) :</text:p>
      <text:p text:style-name="Standard"><text:tab/>(Permet au site d'être le plus rapide possible à l'affichage. Google utilise</text:p>
      <text:p text:style-name="Standard"><text:tab/>directement les performances des sites pour son référencement, les sites avec</text:p>
      <text:p text:style-name="Standard"><text:tab/>de bonnes performances sont mis en avant par rapport aux autres. Permet aussi</text:p>
      <text:p text:style-name="Standard"><text:tab/>de rendre la vis<text:span text:style-name="T1">i</text:span>te du site plus confortable).</text:p>
      <text:p text:style-name="Standard"><text:tab/><text:tab/><text:tab/></text:p>
      <text:p text:style-name="Standard"><text:tab/><text:tab/>- Mise à jour de Bootstrap (framework CSS/JS) (v5.1.3 =&gt; v5.3.8).</text:p>
      <text:p text:style-name="Standard"><text:tab/><text:tab/></text:p>
      <text:p text:style-name="Standard"><text:tab/><text:tab/>- Boots<text:span text:style-name="T1">t</text:span>rap minifié (permet d'alléger le code CSS et JavaScript en </text:p>
      <text:p text:style-name="Standard"><text:tab/><text:tab/><text:tab/>supprimant au chargement tout les éléments visuels nécessaires aux</text:p>
      <text:p text:style-name="Standard"><text:tab/><text:tab/><text:tab/>humains mais superflus aux machines).</text:p>
      <text:p text:style-name="Standard"><text:tab/><text:tab/></text:p>
      <text:p text:style-name="Standard"><text:tab/><text:tab/>- Chargement différé du JavaScript pour améliorer la rapidité de chargement</text:p>
      <text:p text:style-name="Standard"><text:tab/><text:tab/><text:tab/>du visuel de la page.</text:p>
      <text:p text:style-name="Standard"><text:tab/><text:tab/></text:p>
      <text:p text:style-name="Standard"><text:tab/><text:tab/>- Suppression de JQuery, bibliothèque JavaScript aujourd'hui obsolète</text:p>
      <text:p text:style-name="Standard"><text:tab/><text:tab/><text:tab/>car trop lourde et gourmande en terme de performances.</text:p>
      <text:p text:style-name="Standard"><text:tab/><text:tab/></text:p>
      <text:p text:style-name="Standard"><text:tab/><text:tab/>- Remplacement de JQuery par du JavaScript natif, solution plus moderne</text:p>
      <text:p text:style-name="Standard"><text:tab/><text:tab/><text:tab/>et meilleures performances.</text:p>
      <text:p text:style-name="Standard"><text:tab/><text:tab/></text:p>
      <text:p text:style-name="Standard"><text:tab/><text:tab/>- Suppression de MauGallery (bibliothèque JavaScript affiliée à JQuery</text:p>
      <text:p text:style-name="Standard"><text:tab/><text:tab/><text:tab/>servant à afficher la modale de la galerie d'images, styliser la galerie</text:p>
      <text:p text:style-name="Standard"><text:tab/><text:tab/><text:tab/>et afficher/faire fonctionner la barre de filtres, aujourd'hui obsolète</text:p>
      <text:p text:style-name="Standard"><text:tab/><text:tab/><text:tab/>pour les mêmes raisons que JQuery).</text:p>
      <text:p text:style-name="Standard"><text:tab/><text:tab/></text:p>
      <text:p text:style-name="Standard"><text:tab/><text:tab/>- Remplacement de MauGallery par BaguetteBox, bibliothèque plus récente avec</text:p>
      <text:p text:style-name="Standard"><text:tab/><text:tab/><text:tab/>un affichage plus moderne, plus légère et moins gourmande en performances.</text:p>
      <text:p text:style-name="Standard"><text:tab/><text:tab/><text:tab/></text:p>
      <text:p text:style-name="Standard"><text:tab/><text:tab/>- Remplacement de MauGallery par du CSS natif pour le style visuel de la galerie,</text:p>
      <text:p text:style-name="Standard"><text:tab/><text:tab/><text:tab/>solution plus moderne et meilleures performances.</text:p>
      <text:p text:style-name="Standard"><text:tab/><text:tab/><text:tab/></text:p>
      <text:p text:style-name="Standard"><text:tab/><text:tab/>- Remplacement de MauGallery pour la barre de filtre par du HTML/CSS/JS, <text:tab/><text:tab/><text:tab/><text:tab/>solutio<text:span text:style-name="T1">n </text:span>plus moderne et meilleures performances.</text:p>
      <text:p text:style-name="Standard"><text:tab/></text:p>
      <text:p text:style-name="Standard"><text:tab/><text:tab/>- Changement du format des images de JPEG à WebP (format plus moderne qui <text:tab/><text:tab/><text:tab/><text:tab/>permet d'économiser environ 25% à 50% de taille d'image, ce qui permet un <text:tab/><text:tab/><text:tab/>chargement de page plus rapide tout en gardant une bonne qualité d'image).</text:p>
      <text:p text:style-name="Standard"><text:tab/><text:tab/><text:tab/></text:p>
      <text:p text:style-name="Standard"><text:tab/><text:tab/>- Utilisation de TinyPNG pour compresser les images et gagner entre 50% et 70% de</text:p>
      <text:p text:style-name="Standard"><text:tab/><text:tab/><text:tab/>poids d'images.</text:p>
      <text:p text:style-name="Standard"><text:tab/><text:tab/></text:p>
      <text:p text:style-name="Standard"><text:tab/><text:tab/>- Cropping de toutes les images du site pour améliorer la rapidité du site tout</text:p>
      <text:p text:style-name="Standard"><text:tab/><text:tab/><text:tab/>en étant efficace sur le responsive (ce qui permet au site de s'adapter sur <text:tab/><text:tab/><text:tab/><text:tab/>toutes les tailles d'écrans).</text:p>
      <text:p text:style-name="Standard"><text:tab/></text:p>
      <text:p text:style-name="Standard"><text:soft-page-break/><text:tab/><text:tab/>- Demande au navigateur de passer la première image de la page en "hero" au <text:tab/><text:tab/><text:tab/><text:tab/>chargement avec l'attribut HTML fetchpriority="high", optimisation moderne <text:tab/><text:tab/><text:tab/>pour améliorer les performances de la page.</text:p>
      <text:p text:style-name="Standard"><text:tab/><text:tab/><text:tab/><text:tab/></text:p>
      <text:p text:style-name="Standard">Accessibilité (67% au départ, 96% maintenant) et SEO (73% au départ, 100% maintenant) :</text:p>
      <text:p text:style-name="Standard"><text:tab/>(Très important pour les personnes en situation de handicap, et celles atteintes de troubles</text:p>
      <text:p text:style-name="Standard"><text:tab/>ou certaines maladies. Est aussi très important pour le référencement, le SEO. De manière</text:p>
      <text:p text:style-name="Standard"><text:tab/>générale, Google valorise les sites avec une bonne accessibilité et une bonne structure).</text:p>
      <text:p text:style-name="Standard"><text:tab/></text:p>
      <text:p text:style-name="Standard"><text:tab/><text:tab/>- Ajout des alt sur les images (indispensable pour les lecteurs d'écran, permet de</text:p>
      <text:p text:style-name="Standard"><text:tab/><text:tab/><text:tab/>nommer les images lorsqu'elles ne s'affichent pas. Google lit aussi les alt pour</text:p>
      <text:p text:style-name="Standard"><text:tab/><text:tab/><text:tab/>comprendre et interpréter les images, ce qui aide au référencement).</text:p>
      <text:p text:style-name="Standard"><text:tab/><text:tab/><text:tab/></text:p>
      <text:p text:style-name="Standard"><text:tab/><text:tab/>- Ajout des aria-label sur les boutons (indispensable pour les lecteurs d'écran, permet <text:tab/><text:tab/><text:tab/>de nommer les éléments comme les boutons, ce qui aide à la compréhension).</text:p>
      <text:p text:style-name="Standard"><text:tab/><text:tab/><text:tab/></text:p>
      <text:p text:style-name="Standard"><text:tab/><text:tab/>- Association des labels et input dans le formulaire d'envoi (permet aux lecteurs <text:tab/><text:tab/><text:tab/><text:tab/>d'écran de bien retranscrire ce qu'il se passe à l'écran et améliore la zone <text:tab/><text:tab/><text:tab/><text:tab/>cliquable sur pc ainsi que sur mobile. Google lit aussi plus facilement la <text:tab/><text:tab/><text:tab/><text:tab/>structure du site avec cet ajout).</text:p>
      <text:p text:style-name="Standard"><text:tab/><text:tab/><text:tab/></text:p>
      <text:p text:style-name="Standard"><text:tab/><text:tab/>- Ajout du &lt;title&gt; sur le document HTML (Permet de voir le nom de la page dans <text:tab/><text:tab/><text:tab/>l'affichage de l'onglet. Très important aussi pour le SEO car Google utilise <text:tab/><text:tab/><text:tab/>souvent le titre dans les résultats de recherche et s'en sert pour appréhender le <text:tab/><text:tab/><text:tab/>contenu de la page).</text:p>
      <text:p text:style-name="Standard"><text:tab/><text:tab/><text:tab/></text:p>
      <text:p text:style-name="Standard"><text:tab/><text:tab/>- Ajout de l'attribut &lt;lang="fr"&gt; au document HTML (Permet d'indiquer la langue <text:tab/><text:tab/><text:tab/>principale de la page. Les lecteurs d'écran peuvent donc prononcer <text:tab/><text:tab/><text:tab/><text:tab/>correctement les textes avec le bon accent et les spécificités de la langue).</text:p>
      <text:p text:style-name="Standard"><text:tab/><text:tab/><text:tab/></text:p>
      <text:p text:style-name="Standard"><text:tab/><text:tab/>- Mise à jour de la sémantique HTML (Permet aux lecteurs d'écran de bien séparer <text:tab/><text:tab/><text:tab/>les différentes parties de la page web, plutôt que de tout lire en blocs, ce qui <text:tab/><text:tab/><text:tab/>rend la navigation très difficile).</text:p>
      <text:p text:style-name="Standard"><text:tab/><text:tab/><text:tab/></text:p>
      <text:p text:style-name="Standard"><text:tab/><text:tab/>- Revue de l'ordre des titres &lt;h&gt; (La hiérarchie est très importante en accessibilité <text:tab/><text:tab/><text:tab/>pour créer une sorte de "sommaire" interne à la page. Google utilise aussi les <text:tab/><text:tab/><text:tab/>titres pour le SEO, ce qui lui permet d'appréhender le sujet de la page, la <text:tab/><text:tab/><text:tab/><text:tab/>structure du site etc. Aide aussi à la navigation rapide).</text:p>
      <text:p text:style-name="Standard"><text:tab/><text:tab/><text:tab/></text:p>
      <text:p text:style-name="Standard"><text:tab/><text:tab/>- Ajout de la meta description (Résumé court de la page web, lu et utilisé par les <text:tab/><text:tab/><text:tab/><text:tab/>moteurs de recherche. S'affiche sous le titre du résultat de recherche. Elle sert <text:tab/><text:tab/><text:tab/>à "attirer le clic").</text:p>
      <text:p text:style-name="Standard"><text:tab/><text:tab/></text:p>
      <text:p text:style-name="Standard"><text:tab/><text:tab/>-Ajout des metas réseaux sociaux Open Graph et Twitter (Permet d'avoir de bonnes <text:tab/><text:tab/><text:tab/>présentations sur les partages au sein des réseaux sociaux).</text:p>
      <text:p text:style-name="Standard"><text:tab/><text:tab/><text:tab/></text:p>
      <text:p text:style-name="Standard"><text:tab/><text:tab/>- Ajout des rich snippets avec le balisage Schema.org (Utile pour améliorer le taux de <text:tab/><text:tab/><text:tab/>clic, aider Google à comprendre la page).</text:p>
      <text:p text:style-name="Standard"><text:tab/><text:tab/><text:tab/></text:p>
      <text:p text:style-name="Standard"><text:tab/><text:tab/>- Correction des fautes d'orthographe, mots manquants, ainsi qu'une erreur d'auteur <text:tab/><text:tab/><text:tab/>sur la deuxième citation.</text:p>
      <text:p text:style-name="Standard"><text:tab/><text:tab/><text:tab/></text:p>
      <text:p text:style-name="Standard"><text:soft-page-break/><text:tab/><text:tab/>- Revue de la mise en page du document HTML pour aider aux éventuels prochains <text:tab/><text:tab/><text:tab/>travaux de maintenance.</text:p>
      <text:p text:style-name="Standard"><text:tab/><text:tab/><text:tab/></text:p>
      <text:p text:style-name="Standard"><text:tab/><text:tab/>- Correction des catégories des images pour une meilleure compréhension en <text:tab/><text:tab/><text:tab/><text:tab/>maintena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0:46:30.466651600</meta:creation-date>
    <dc:date>2026-06-01T10:51:53.056644600</dc:date>
    <meta:editing-duration>PT5M23S</meta:editing-duration>
    <meta:editing-cycles>1</meta:editing-cycles>
    <meta:document-statistic meta:table-count="0" meta:image-count="0" meta:object-count="0" meta:page-count="3" meta:paragraph-count="80" meta:word-count="840" meta:character-count="5430" meta:non-whitespace-character-count="4381"/>
    <meta:generator>LibreOffice/25.2.7.2$Windows_X86_64 LibreOffice_project/5cbfd1ab6520636bb5f7b99185aa69bd7456825d</meta:generator>
  </office:meta>
</office:document-meta>
</file>